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hropic Sans" svg:font-family="'Anthropic Sans', system-ui, 'Segoe UI', Robo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83a5" officeooo:paragraph-rsid="000983a5"/>
    </style:style>
    <style:style style:name="P2" style:family="paragraph" style:parent-style-name="Standard">
      <style:text-properties fo:font-variant="normal" fo:text-transform="none" fo:color="#121212" loext:opacity="100%" style:font-name="Anthropic Sans" fo:font-size="12pt" fo:letter-spacing="normal" fo:font-style="normal" fo:font-weight="bold" officeooo:rsid="000983a5" officeooo:paragraph-rsid="000983a5"/>
    </style:style>
    <style:style style:name="P3" style:family="paragraph" style:parent-style-name="Standard">
      <style:text-properties fo:font-variant="normal" fo:text-transform="none" fo:color="#121212" loext:opacity="100%" style:font-name="Anthropic Sans" fo:font-size="12pt" fo:letter-spacing="normal" fo:font-style="normal" fo:font-weight="bold" officeooo:rsid="000b25ba" officeooo:paragraph-rsid="000b25ba"/>
    </style:style>
    <style:style style:name="P4" style:family="paragraph" style:parent-style-name="Standard">
      <style:text-properties fo:font-variant="normal" fo:text-transform="none" fo:color="#121212" loext:opacity="100%" style:font-name="Anthropic Sans" fo:font-size="12pt" fo:letter-spacing="normal" fo:font-style="normal" fo:font-weight="bold" officeooo:rsid="000c2405" officeooo:paragraph-rsid="000c2405"/>
    </style:style>
    <style:style style:name="P5" style:family="paragraph" style:parent-style-name="Standard">
      <style:text-properties fo:font-variant="normal" fo:text-transform="none" fo:color="#121212" loext:opacity="100%" style:font-name="Anthropic Sans" fo:font-size="12pt" fo:letter-spacing="normal" fo:font-style="normal" fo:font-weight="bold" officeooo:rsid="000c2405" officeooo:paragraph-rsid="000cc8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he question and who it is for.</text:p>
      <text:p text:style-name="P1"/>
      <text:p text:style-name="P2">The project im working on is for my brother. He wants me to answer the question: what is the weather like in dunedin on average. He wants this question to be answered in such a way that the data is visualised on one page that he can print off and have at the front door to inform he above just the weather prediction for the day.</text:p>
      <text:p text:style-name="P2"/>
      <text:p text:style-name="P2">I intend the output to be a collection of visualisations that can represent the data averaged over seasons or months(to be determined based on variability between these groupings, or what data is available) so he can quickly infer general clothing and weather expectations above any weather prediction.</text:p>
      <text:p text:style-name="P2"/>
      <text:p text:style-name="P2"/>
      <text:p text:style-name="P2">I want to go for cover over specificity. For example a visualisation of the wind direction at any hour in the day averaged over the season. Similarly with temperatures etc. concretely I mean that he will infer from wider scope wind rose. The single most useful thing the poster tells him is the expected temperature, windirection and speed for any particular day in the month or season he is in.</text:p>
      <text:p text:style-name="P2"/>
      <text:p text:style-name="P2">I plan to use historical data over point forecast because it tells the real history of Dunedin rather than a prediction for a date.</text:p>
      <text:p text:style-name="P2"/>
      <text:p text:style-name="P2">I would like to have a range of variables including wind speed, wind direction, cloud cover, rainfall, temperature, pressure.</text:p>
      <text:p text:style-name="P2"/>
      <text:p text:style-name="P2">I expect to find quite a lot of variation between the seasons, with wind direction changing between northerly averages in the warmer months and southerlies in the colder months. I expect for somemonths that southerly winds will increase at certain times during the day more still in the morning and increasing as the day goes on. I expect winter to be the wettest month, and autumn to be rather dry and without much cloud cover and wind despite the temperatures going down. I expect rainfall to be rather high during the day in summer and spring with relatively little rain in autumn.</text:p>
      <text:p text:style-name="P2"/>
      <text:p text:style-name="P3">Relative to other seasons in Dunedin. I expect autumn cloud cover to be lower while wind speed increases and shifts on average southerly. I expect rainfaill to be relatively low, and cloud cover relatively low. I expect winter to have higher rainfall, cloud cover, southerly winds, and low temperatures. I expect spring to have higher rain, higher temperatures with middle winds shifting northern. With periods of high wind and rainfall. Summer I expect to have reasonable rainfall with low winds and low cloud cover. Higher temperatures with low southerly winds.</text:p>
      <text:p text:style-name="P4"><text:soft-page-break/>I plan to use the NIWA daily/hourly data of which the variables I plan to use are:</text:p>
      <text:p text:style-name="P4"/>
      <text:p text:style-name="P4">station pressure[HPA](average per preceding 1 minute), </text:p>
      <text:p text:style-name="P4"/>
      <text:p text:style-name="P5">air temperature[deg C], </text:p>
      <text:p text:style-name="P5">relative humidity[percent](average for preceding on minute), </text:p>
      <text:p text:style-name="P4"/>
      <text:p text:style-name="P5">windspeed[m/s], </text:p>
      <text:p text:style-name="P5">wind direction[Deg T](mean over preceding interval(hour)), </text:p>
      <text:p text:style-name="P4"/>
      <text:p text:style-name="P4">rain[mm](cumulative over preceding interval)</text:p>
      <text:p text:style-name="P4"/>
      <text:p text:style-name="P4">Sunshine[hrs](cumulative over field)</text:p>
      <text:p text:style-name="P4"/>
      <text:p text:style-name="P4"><text:s/>Possibly(temperatures such as max and <text:s/>min temp in [deg C](over preceding period.)</text:p>
      <text:p text:style-name="P4"/>
      <text:p text:style-name="P4">Gusts: windspeed and direction, with maximums over preceding period.</text:p>
      <text:p text:style-name="P4"/>
      <text:p text:style-name="P4"/>
      <text:p text:style-name="P4"/>
      <text:p text:style-name="P4">My wind direction is in degrees so I will convert to compass readings in post analysis.</text:p>
      <text:p text:style-name="P4"/>
      <text:p text:style-name="P4">I saw wetbulb temperature, dew point temperature and dry bulb temperature and decided to use dry bul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hropic Sans" svg:font-family="'Anthropic Sans', system-ui, 'Segoe UI', Robo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30T14:39:52.978869269</meta:creation-date>
    <meta:generator>LibreOffice/24.2.7.2$Linux_X86_64 LibreOffice_project/420$Build-2</meta:generator>
    <dc:date>2026-06-21T19:13:06.414179298</dc:date>
    <meta:editing-duration>PT11H31M51S</meta:editing-duration>
    <meta:editing-cycles>4</meta:editing-cycles>
    <meta:document-statistic meta:table-count="0" meta:image-count="0" meta:object-count="0" meta:page-count="2" meta:paragraph-count="20" meta:word-count="525" meta:character-count="3177" meta:non-whitespace-character-count="2665"/>
  </office:meta>
</office:document-meta>
</file>